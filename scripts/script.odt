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""TEM nanoparticle sizing: threshold → watershed → Feret metrics."""</text:p>
      <text:p text:style-name="Standard"/>
      <text:p text:style-name="Standard">from pathlib import Path</text:p>
      <text:p text:style-name="Standard"/>
      <text:p text:style-name="Standard">import matplotlib.pyplot as plt</text:p>
      <text:p text:style-name="Standard">import numpy as np</text:p>
      <text:p text:style-name="Standard">import pandas as pd</text:p>
      <text:p text:style-name="Standard">from skimage import filters, morphology, measure, util</text:p>
      <text:p text:style-name="Standard">from skimage.segmentation import watershed</text:p>
      <text:p text:style-name="Standard">from scipy import ndimage as ndi</text:p>
      <text:p text:style-name="Standard"/>
      <text:p text:style-name="Standard">NM_PER_PIXEL = 0.5 <text:s/># replace via scale bar / calibration.yaml</text:p>
      <text:p text:style-name="Standard"/>
      <text:p text:style-name="Standard"/>
      <text:p text:style-name="Standard">def load_gray(path: str | Path) -&gt; np.ndarray:</text:p>
      <text:p text:style-name="Standard"><text:s text:c="4"/>img = util.img_as_float(np.asarray(plt.imread(path)))</text:p>
      <text:p text:style-name="Standard"><text:s text:c="4"/>return img[..., 0] if img.ndim == 3 else img</text:p>
      <text:p text:style-name="Standard"/>
      <text:p text:style-name="Standard"/>
      <text:p text:style-name="Standard">def segment_particles(gray: np.ndarray, min_area_px: int = 50) -&gt; np.ndarray:</text:p>
      <text:p text:style-name="Standard"><text:s text:c="4"/>"""Return labeled image (one label per particle)."""</text:p>
      <text:p text:style-name="Standard"><text:s text:c="4"/>smoothed = filters.gaussian(gray, sigma=1.0)</text:p>
      <text:p text:style-name="Standard"><text:s text:c="4"/>thresh = filters.threshold_otsu(smoothed)</text:p>
      <text:p text:style-name="Standard"><text:s text:c="4"/>binary = smoothed &lt; thresh <text:s/># TEM: particles often darker; flip if needed</text:p>
      <text:p text:style-name="Standard"/>
      <text:p text:style-name="Standard"><text:s text:c="4"/>binary = morphology.remove_small_objects(binary, min_size=min_area_px)</text:p>
      <text:p text:style-name="Standard"><text:s text:c="4"/>binary = morphology.opening(binary, morphology.disk(1))</text:p>
      <text:p text:style-name="Standard"><text:s text:c="4"/>binary = ndi.binary_fill_holes(binary)</text:p>
      <text:p text:style-name="Standard"/>
      <text:p text:style-name="Standard"><text:s text:c="4"/>distance = ndi.distance_transform_edt(binary)</text:p>
      <text:p text:style-name="Standard"><text:s text:c="4"/>coords = morphology.peak_local_max(</text:p>
      <text:p text:style-name="Standard"><text:s text:c="8"/>distance, min_distance=5, labels=binary</text:p>
      <text:p text:style-name="Standard"><text:s text:c="4"/>)</text:p>
      <text:p text:style-name="Standard"><text:s text:c="4"/>markers = np.zeros_like(distance, dtype=int)</text:p>
      <text:p text:style-name="Standard"><text:s text:c="4"/>for i, (r, c) in enumerate(coords, start=1):</text:p>
      <text:p text:style-name="Standard"><text:s text:c="8"/>markers[r, c] = i</text:p>
      <text:p text:style-name="Standard"/>
      <text:p text:style-name="Standard"><text:s text:c="4"/>labels = watershed(-distance, markers, mask=binary)</text:p>
      <text:p text:style-name="Standard"><text:s text:c="4"/>return labels</text:p>
      <text:p text:style-name="Standard"/>
      <text:p text:style-name="Standard"/>
      <text:p text:style-name="Standard">def measure_labels(labels: np.ndarray, nm_per_px: float) -&gt; pd.DataFrame:</text:p>
      <text:p text:style-name="Standard"><text:s text:c="4"/>rows = []</text:p>
      <text:p text:style-name="Standard"><text:s text:c="4"/>for region in measure.regionprops(labels):</text:p>
      <text:p text:style-name="Standard"><text:s text:c="8"/># scikit-image &gt;= 0.19</text:p>
      <text:p text:style-name="Standard"><text:s text:c="8"/>length_px = region.feret_diameter_max</text:p>
      <text:p text:style-name="Standard"><text:s text:c="8"/>width_px = region.feret_diameter_min</text:p>
      <text:p text:style-name="Standard"><text:s text:c="8"/>length_nm = length_px * nm_per_px</text:p>
      <text:p text:style-name="Standard"><text:s text:c="8"/>width_nm = width_px * nm_per_px</text:p>
      <text:p text:style-name="Standard"><text:s text:c="8"/>aspect = length_nm / width_nm if width_nm &gt; 0 else np.nan</text:p>
      <text:p text:style-name="Standard"/>
      <text:p text:style-name="Standard"><text:s text:c="8"/>shape = "rod" if aspect &gt;= 1.5 else "sphere"</text:p>
      <text:p text:style-name="Standard"><text:soft-page-break/></text:p>
      <text:p text:style-name="Standard"><text:s text:c="8"/>rows.append({</text:p>
      <text:p text:style-name="Standard"><text:s text:c="12"/>"label": region.label,</text:p>
      <text:p text:style-name="Standard"><text:s text:c="12"/>"length_nm": length_nm,</text:p>
      <text:p text:style-name="Standard"><text:s text:c="12"/>"width_nm": width_nm,</text:p>
      <text:p text:style-name="Standard"><text:s text:c="12"/>"equiv_diameter_nm": region.equivalent_diameter * nm_per_px,</text:p>
      <text:p text:style-name="Standard"><text:s text:c="12"/>"aspect_ratio": aspect,</text:p>
      <text:p text:style-name="Standard"><text:s text:c="12"/>"shape_class": shape,</text:p>
      <text:p text:style-name="Standard"><text:s text:c="12"/>"area_nm2": region.area * nm_per_px**2,</text:p>
      <text:p text:style-name="Standard"><text:s text:c="12"/>"solidity": region.solidity,</text:p>
      <text:p text:style-name="Standard"><text:s text:c="8"/>})</text:p>
      <text:p text:style-name="Standard"><text:s text:c="4"/>return pd.DataFrame(rows)</text:p>
      <text:p text:style-name="Standard"/>
      <text:p text:style-name="Standard"/>
      <text:p text:style-name="Standard">def summarize_rods(df: pd.DataFrame) -&gt; dict:</text:p>
      <text:p text:style-name="Standard"><text:s text:c="4"/>rods = df[df["shape_class"] == "rod"]</text:p>
      <text:p text:style-name="Standard"><text:s text:c="4"/>return {</text:p>
      <text:p text:style-name="Standard"><text:s text:c="8"/>"n_total": len(df),</text:p>
      <text:p text:style-name="Standard"><text:s text:c="8"/>"n_rods": len(rods),</text:p>
      <text:p text:style-name="Standard"><text:s text:c="8"/>"mean_length_nm": rods["length_nm"].mean(),</text:p>
      <text:p text:style-name="Standard"><text:s text:c="8"/>"std_length_nm": rods["length_nm"].std(),</text:p>
      <text:p text:style-name="Standard"><text:s text:c="8"/>"mean_width_nm": rods["width_nm"].mean(),</text:p>
      <text:p text:style-name="Standard"><text:s text:c="4"/>}</text:p>
      <text:p text:style-name="Standard"/>
      <text:p text:style-name="Standard"/>
      <text:p text:style-name="Standard">def validate_enright(summary: dict) -&gt; pd.DataFrame:</text:p>
      <text:p text:style-name="Standard"><text:s text:c="4"/>"""Enright et al. 2018 starting-rod reference (~27.6 nm length)."""</text:p>
      <text:p text:style-name="Standard"><text:s text:c="4"/>ref = {"mean_length_nm": 27.6, "mean_width_nm": 2.9}</text:p>
      <text:p text:style-name="Standard"><text:s text:c="4"/>rows = []</text:p>
      <text:p text:style-name="Standard"><text:s text:c="4"/>for key, lit in ref.items():</text:p>
      <text:p text:style-name="Standard"><text:s text:c="8"/>if key in summary and summary[key] is not None:</text:p>
      <text:p text:style-name="Standard"><text:s text:c="12"/>meas = summary[key]</text:p>
      <text:p text:style-name="Standard"><text:s text:c="12"/>rows.append({</text:p>
      <text:p text:style-name="Standard"><text:s text:c="16"/>"metric": key,</text:p>
      <text:p text:style-name="Standard"><text:s text:c="16"/>"measured": meas,</text:p>
      <text:p text:style-name="Standard"><text:s text:c="16"/>"literature": lit,</text:p>
      <text:p text:style-name="Standard"><text:s text:c="16"/>"delta_nm": meas - lit,</text:p>
      <text:p text:style-name="Standard"><text:s text:c="16"/>"delta_pct": 100 * (meas - lit) / lit,</text:p>
      <text:p text:style-name="Standard"><text:s text:c="12"/>})</text:p>
      <text:p text:style-name="Standard"><text:s text:c="4"/>return pd.DataFrame(rows)</text:p>
      <text:p text:style-name="Standard"/>
      <text:p text:style-name="Standard"/>
      <text:p text:style-name="Standard">def run(image_path: str | Path, nm_per_px: float = NM_PER_PIXEL, out_dir: str | Path = "data/results"):</text:p>
      <text:p text:style-name="Standard"><text:s text:c="4"/>out_dir = Path(out_dir)</text:p>
      <text:p text:style-name="Standard"><text:s text:c="4"/>out_dir.mkdir(parents=True, exist_ok=True)</text:p>
      <text:p text:style-name="Standard"/>
      <text:p text:style-name="Standard"><text:s text:c="4"/>gray = load_gray(image_path)</text:p>
      <text:p text:style-name="Standard"><text:s text:c="4"/>labels = segment_particles(gray)</text:p>
      <text:p text:style-name="Standard"><text:s text:c="4"/>df = measure_labels(labels, nm_per_px)</text:p>
      <text:p text:style-name="Standard"><text:s text:c="4"/>summary = summarize_rods(df)</text:p>
      <text:p text:style-name="Standard"><text:s text:c="4"/>validation = validate_enright(summary)</text:p>
      <text:p text:style-name="Standard"><text:soft-page-break/></text:p>
      <text:p text:style-name="Standard"><text:s text:c="4"/>stem = Path(image_path).stem</text:p>
      <text:p text:style-name="Standard"><text:s text:c="4"/>df.to_csv(out_dir / f"{stem}_particles.csv", index=False)</text:p>
      <text:p text:style-name="Standard"><text:s text:c="4"/>validation.to_csv(out_dir / f"{stem}_validation.csv", index=False)</text:p>
      <text:p text:style-name="Standard"/>
      <text:p text:style-name="Standard"><text:s text:c="4"/>print(summary)</text:p>
      <text:p text:style-name="Standard"><text:s text:c="4"/>print(validation)</text:p>
      <text:p text:style-name="Standard"/>
      <text:p text:style-name="Standard"><text:s text:c="4"/>fig, ax = plt.subplots(1, 2, figsize=(10, 4))</text:p>
      <text:p text:style-name="Standard"><text:s text:c="4"/>ax[0].imshow(gray, cmap="gray")</text:p>
      <text:p text:style-name="Standard"><text:s text:c="4"/>ax[0].imshow(labels, cmap="nipy_spectral", alpha=0.35)</text:p>
      <text:p text:style-name="Standard"><text:s text:c="4"/>ax[0].set_title("Segmentation overlay")</text:p>
      <text:p text:style-name="Standard"><text:s text:c="4"/>ax[0].axis("off")</text:p>
      <text:p text:style-name="Standard"/>
      <text:p text:style-name="Standard"><text:s text:c="4"/>rods = df[df["shape_class"] == "rod"]</text:p>
      <text:p text:style-name="Standard"><text:s text:c="4"/>ax[1].hist(rods["length_nm"].dropna(), bins=20, edgecolor="k")</text:p>
      <text:p text:style-name="Standard"><text:s text:c="4"/>ax[1].axvline(27.6, color="r", ls="--", label="Enright 2018 (27.6 nm)")</text:p>
      <text:p text:style-name="Standard"><text:s text:c="4"/>ax[1].set_xlabel("Rod length (nm)")</text:p>
      <text:p text:style-name="Standard"><text:s text:c="4"/>ax[1].legend()</text:p>
      <text:p text:style-name="Standard"><text:s text:c="4"/>fig.tight_layout()</text:p>
      <text:p text:style-name="Standard"><text:s text:c="4"/>fig.savefig(out_dir / f"{stem}_histogram.png", dpi=200)</text:p>
      <text:p text:style-name="Standard"><text:s text:c="4"/>plt.close(fig)</text:p>
      <text:p text:style-name="Standard"/>
      <text:p text:style-name="Standard"><text:s text:c="4"/>return df, summary, validation</text:p>
      <text:p text:style-name="Standard"/>
      <text:p text:style-name="Standard"/>
      <text:p text:style-name="Standard">if __name__ == "__main__":</text:p>
      <text:p text:style-name="Standard"><text:s text:c="4"/>run("data/examples/rod_sample.tif", nm_per_px=0.5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15:14:29.374880177</meta:creation-date>
    <dc:date>2026-07-06T15:22:14.305678834</dc:date>
    <meta:editing-duration>PT7M46S</meta:editing-duration>
    <meta:editing-cycles>1</meta:editing-cycles>
    <meta:document-statistic meta:table-count="0" meta:image-count="0" meta:object-count="0" meta:page-count="3" meta:paragraph-count="103" meta:word-count="413" meta:character-count="4249" meta:non-whitespace-character-count="3374"/>
    <meta:generator>LibreOffice/24.2.7.2$Linux_X86_64 LibreOffice_project/420$Build-2</meta:generator>
  </office:meta>
</office:document-meta>
</file>